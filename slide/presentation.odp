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7D94F61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Aptos Display" svg:font-family="'Aptos Display'" style:font-family-generic="swiss" style:font-pitch="variable"/>
    <style:font-face style:name="Aptos Display1" svg:font-family="'Aptos Display'" style:font-family-generic="modern" style:font-pitch="fixed"/>
    <style:font-face style:name="Aptos1" svg:font-family="Aptos" style:font-family-generic="swiss" style:font-pitch="variable"/>
    <style:font-face style:name="Aptos2" svg:font-family="Aptos" style:font-family-generic="modern" style:font-pitch="fixed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8fbf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f8fbfd" svg:stroke-opacity="0%" draw:fill="solid" draw:fill-color="#f8fbf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10a6a6" svg:stroke-opacity="0%" draw:fill="solid" draw:fill-color="#10a6a6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solid" svg:stroke-width="0cm" svg:stroke-color="#10a6a6" svg:stroke-opacity="0%" draw:fill="solid" draw:fill-color="#10a6a6" draw:textarea-horizontal-align="justify" draw:textarea-vertical-align="middle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42cm" svg:stroke-color="#cad7e0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5">
      <style:graphic-properties draw:stroke="solid" svg:stroke-width="0.035cm" svg:stroke-color="#cad7e0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solid" svg:stroke-width="0.035cm" svg:stroke-color="#cad7e0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solid" svg:stroke-width="0.035cm" svg:stroke-color="#cad7e0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solid" svg:stroke-width="0.035cm" svg:stroke-color="#cad7e0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solid" svg:stroke-width="0.035cm" svg:stroke-color="#cad7e0" draw:fill="solid" draw:fill-color="#eaf7f7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0b1f33" draw:fill="solid" draw:fill-color="#0b1f33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f2a43a" svg:stroke-opacity="0%" draw:fill="solid" draw:fill-color="#f2a43a" draw:textarea-horizontal-align="justify" draw:textarea-vertical-align="middle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solid" svg:stroke-width="0.035cm" svg:stroke-color="#cad7e0" draw:fill="solid" draw:fill-color="#ffffff" draw:textarea-horizontal-align="justify" draw:textarea-vertical-align="middle" draw:auto-grow-height="false" draw:fit-to-size="false" style:shrink-to-fit="true" fo:min-height="0cm" fo:min-width="0cm" fo:padding-top="0.004cm" fo:padding-bottom="0.004cm" fo:padding-left="0.004cm" fo:padding-right="0.00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1cm" svg:stroke-color="#cad7e0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gr20" style:family="graphic" style:parent-style-name="standard">
      <style:graphic-properties draw:stroke="solid" svg:stroke-width="0.035cm" svg:stroke-color="#f8fbfd" svg:stroke-opacity="0%" draw:fill="solid" draw:fill-color="#f8fbfd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35cm" svg:stroke-color="#10a6a6" svg:stroke-opacity="0%" draw:fill="solid" draw:fill-color="#10a6a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21cm" svg:stroke-color="#cad7e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35cm" svg:stroke-color="#10a6a6" draw:fill="solid" draw:fill-color="#eaf7f7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solid" svg:stroke-width="0.035cm" svg:stroke-color="#f2a43a" draw:fill="solid" draw:fill-color="#fff5e4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35cm" svg:stroke-color="#d74e4e" draw:fill="solid" draw:fill-color="#fdedec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4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42cm" svg:stroke-color="#7b8a97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5" style:family="graphic" style:parent-style-name="standard" style:list-style-name="L2">
      <style:graphic-properties draw:stroke="solid" svg:stroke-width="0.035cm" svg:stroke-color="#0b1f33" draw:fill="solid" draw:fill-color="#0b1f33" draw:textarea-horizontal-align="justify" draw:textarea-vertical-align="middle" draw:auto-grow-height="false" draw:fit-to-size="false" style:shrink-to-fit="true" fo:min-height="0cm" fo:min-width="0cm" fo:padding-top="0.004cm" fo:padding-bottom="0.004cm" fo:padding-left="0.004cm" fo:padding-right="0.004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.042cm" svg:stroke-color="#cad7e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1" style:family="graphic" style:parent-style-name="standard" style:list-style-name="L5">
      <style:graphic-properties draw:stroke="solid" svg:stroke-width="0.035cm" svg:stroke-color="#cad7e0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solid" svg:stroke-width="0.035cm" svg:stroke-color="#cad7e0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solid" svg:stroke-width="0.035cm" svg:stroke-color="#cad7e0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solid" svg:stroke-width="0.035cm" svg:stroke-color="#cad7e0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solid" svg:stroke-width="0.035cm" svg:stroke-color="#cad7e0" draw:fill="solid" draw:fill-color="#eaf7f7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35cm" svg:stroke-color="#0b1f33" draw:fill="solid" draw:fill-color="#0b1f33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cm" svg:stroke-color="#d74e4e" svg:stroke-opacity="0%" draw:fill="solid" draw:fill-color="#d74e4e" draw:textarea-horizontal-align="justify" draw:textarea-vertical-align="middle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58" style:family="graphic" style:parent-style-name="standard" style:list-style-name="L5">
      <style:graphic-properties draw:stroke="solid" svg:stroke-width="0.035cm" svg:stroke-color="#10a6a6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59" style:family="graphic" style:parent-style-name="standard" style:list-style-name="L5">
      <style:graphic-properties draw:stroke="solid" svg:stroke-width="0.035cm" svg:stroke-color="#f2a43a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60" style:family="graphic" style:parent-style-name="standard" style:list-style-name="L5">
      <style:graphic-properties draw:stroke="solid" svg:stroke-width="0.035cm" svg:stroke-color="#145da0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61" style:family="graphic" style:parent-style-name="standard" style:list-style-name="L5">
      <style:graphic-properties draw:stroke="solid" svg:stroke-width="0.035cm" svg:stroke-color="#29a36a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.035cm" svg:stroke-color="#7b8a97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35cm" svg:stroke-color="#10a6a6" draw:fill="solid" draw:fill-color="#eaf7f7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solid" svg:stroke-width="0.035cm" svg:stroke-color="#d74e4e" draw:fill="solid" draw:fill-color="#fdedec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svg:stroke-width="0.035cm" svg:stroke-color="#0b1f33" draw:fill="solid" draw:fill-color="#0b1f33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7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solid" svg:stroke-width="0.035cm" svg:stroke-color="#10a6a6" draw:fill="solid" draw:fill-color="#eaf7f7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79" style:family="graphic" style:parent-style-name="standard" style:list-style-name="L5">
      <style:graphic-properties draw:stroke="solid" svg:stroke-width="0.035cm" svg:stroke-color="#cad7e0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solid" svg:stroke-width="0.035cm" svg:stroke-color="#f2a43a" draw:fill="solid" draw:fill-color="#fff5e4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86" style:family="graphic" style:parent-style-name="standard" style:list-style-name="L5">
      <style:graphic-properties draw:stroke="solid" svg:stroke-width="0.035cm" svg:stroke-color="#cad7e0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8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solid" svg:stroke-width="0.035cm" svg:stroke-color="#145da0" draw:fill="solid" draw:fill-color="#eaf7f7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93" style:family="graphic" style:parent-style-name="standard" style:list-style-name="L5">
      <style:graphic-properties draw:stroke="solid" svg:stroke-width="0.035cm" svg:stroke-color="#29a36a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solid" svg:stroke-width="0.035cm" svg:stroke-color="#f2a43a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95" style:family="graphic" style:parent-style-name="standard" style:list-style-name="L5">
      <style:graphic-properties draw:stroke="solid" svg:stroke-width="0.035cm" svg:stroke-color="#d74e4e" draw:fill="solid" draw:fill-color="#ffff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35cm" svg:stroke-color="#0b1f33" draw:fill="solid" draw:fill-color="#0b1f33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35cm" svg:stroke-color="#29a36a" draw:fill="solid" draw:fill-color="#eaf7f7" draw:textarea-horizontal-align="justify" draw:textarea-vertical-align="middle" draw:auto-grow-height="false" draw:fit-to-size="false" style:shrink-to-fit="true" fo:min-height="0cm" fo:min-width="0cm" fo:padding-top="0.003cm" fo:padding-bottom="0.003cm" fo:padding-left="0.559cm" fo:padding-right="2.667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cm" svg:stroke-color="#29a36a" svg:stroke-opacity="0%" draw:fill="solid" draw:fill-color="#29a36a" draw:textarea-horizontal-align="justify" draw:textarea-vertical-align="middle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35cm" svg:stroke-color="#f2a43a" draw:fill="solid" draw:fill-color="#fff5e4" draw:textarea-horizontal-align="justify" draw:textarea-vertical-align="middle" draw:auto-grow-height="false" draw:fit-to-size="false" style:shrink-to-fit="true" fo:min-height="0cm" fo:min-width="0cm" fo:padding-top="0.003cm" fo:padding-bottom="0.003cm" fo:padding-left="0.457cm" fo:padding-right="2.667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cm" svg:stroke-color="#29a36a" svg:stroke-opacity="0%" draw:fill="solid" draw:fill-color="#29a36a" draw:textarea-horizontal-align="justify" draw:textarea-vertical-align="middle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solid" svg:stroke-width="0.035cm" svg:stroke-color="#d74e4e" draw:fill="solid" draw:fill-color="#fdedec" draw:textarea-horizontal-align="justify" draw:textarea-vertical-align="middle" draw:auto-grow-height="false" draw:fit-to-size="false" style:shrink-to-fit="true" fo:min-height="0cm" fo:min-width="0cm" fo:padding-top="0.003cm" fo:padding-bottom="0.003cm" fo:padding-left="0.559cm" fo:padding-right="2.794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svg:stroke-width="0cm" svg:stroke-color="#d74e4e" svg:stroke-opacity="0%" draw:fill="solid" draw:fill-color="#d74e4e" draw:textarea-horizontal-align="justify" draw:textarea-vertical-align="middle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svg:stroke-width="0.035cm" svg:stroke-color="#0b1f33" draw:fill="solid" draw:fill-color="#0b1f33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solid" svg:stroke-width="0.035cm" svg:stroke-color="#29a36a" draw:fill="solid" draw:fill-color="#eaf7f7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solid" svg:stroke-width="0.035cm" svg:stroke-color="#d74e4e" draw:fill="solid" draw:fill-color="#fdedec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3">
      <style:graphic-properties draw:stroke="solid" svg:stroke-width="0.035cm" svg:stroke-color="#7b61ff" draw:fill="solid" draw:fill-color="#eef1ff" draw:textarea-horizontal-align="justify" draw:textarea-vertical-align="middle" draw:auto-grow-height="false" draw:fit-to-size="false" style:shrink-to-fit="true" fo:min-height="0cm" fo:min-width="0cm" fo:padding-top="0.003cm" fo:padding-bottom="0.003cm" fo:padding-left="0.003cm" fo:padding-right="0.003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001cm" fo:padding-bottom="0.001cm" fo:padding-left="0.001cm" fo:padding-right="0.001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12">
      <style:graphic-properties draw:stroke="solid" svg:stroke-width="0.035cm" svg:stroke-color="#0b1f33" draw:fill="solid" draw:fill-color="#0b1f33" draw:textarea-horizontal-align="justify" draw:textarea-vertical-align="middle" draw:auto-grow-height="false" draw:fit-to-size="false" style:shrink-to-fit="true" fo:min-height="0cm" fo:min-width="0cm" fo:padding-top="0.004cm" fo:padding-bottom="0.004cm" fo:padding-left="0.305cm" fo:padding-right="0.305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39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3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3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3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39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39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3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f8fbfd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solid" draw:fill-color="#10a6a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solid" draw:fill-color="#10a6a6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solid" draw:fill-color="#eaf7f7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solid" draw:fill-color="#0b1f33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solid" draw:fill-color="#f2a43a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loext:graphic-properties draw:fill="solid" draw:fill-color="#f8fbfd"/>
      <style:paragraph-properties fo:text-align="start"/>
      <style:text-properties fo:font-size="18pt"/>
    </style:style>
    <style:style style:name="P19" style:family="paragraph">
      <loext:graphic-properties draw:fill="solid" draw:fill-color="#10a6a6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solid" draw:fill-color="#fff5e4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solid" draw:fill-color="#fdedec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loext:graphic-properties draw:fill="solid" draw:fill-color="#d74e4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solid" draw:fill-color="#eaf7f7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solid" draw:fill-color="#29a36a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solid" draw:fill-color="#fff5e4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fdedec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solid" draw:fill-color="#eef1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1" style:family="paragraph">
      <loext:graphic-properties draw:fill="solid" draw:fill-color="#0b1f33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8.19999980926514pt" fo:letter-spacing="normal" fo:language="en" fo:country="US" fo:font-style="normal" style:text-underline-style="none" fo:font-weight="bold" fo:background-color="transparent" style:font-size-asian="8.19999980926514pt" style:font-style-asian="normal" style:font-weight-asian="bold" style:font-size-complex="8.19999980926514pt" style:font-style-complex="normal" style:font-weight-complex="bold"/>
    </style:style>
    <style:style style:name="T2" style:family="text">
      <style:text-properties fo:font-variant="normal" fo:text-transform="none" fo:color="#0b1f33" loext:opacity="100%" style:text-outline="false" style:text-line-through-style="none" style:text-line-through-type="none" style:text-position="0% 100%" style:font-name="Aptos" fo:font-size="29pt" fo:letter-spacing="normal" fo:language="en" fo:country="US" fo:font-style="normal" style:text-underline-style="none" fo:font-weight="bold" fo:background-color="transparent" style:font-size-asian="29pt" style:font-style-asian="normal" style:font-weight-asian="bold" style:font-size-complex="29pt" style:font-style-complex="normal" style:font-weight-complex="bold"/>
    </style:style>
    <style:style style:name="T3" style:family="text">
      <style:text-properties fo:font-variant="normal" fo:text-transform="none" fo:color="#145da0" loext:opacity="100%" style:text-outline="false" style:text-line-through-style="none" style:text-line-through-type="none" style:text-position="0% 100%" style:font-name="Aptos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/>
    </style:style>
    <style:style style:name="T4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7.90000009536743pt" fo:letter-spacing="normal" fo:language="en" fo:country="US" fo:font-style="normal" style:text-underline-style="none" fo:font-weight="normal" fo:background-color="transparent" style:font-size-asian="7.90000009536743pt" style:font-style-asian="normal" style:font-weight-asian="normal" style:font-size-complex="7.90000009536743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7.90000009536743pt" fo:letter-spacing="normal" fo:language="en" fo:country="US" fo:font-style="normal" style:text-underline-style="none" fo:font-weight="normal" fo:background-color="transparent" style:font-size-asian="7.90000009536743pt" style:font-style-asian="normal" style:font-weight-asian="normal" style:font-size-complex="7.90000009536743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9.39999961853027pt" fo:letter-spacing="normal" fo:language="en" fo:country="US" fo:font-style="normal" style:text-underline-style="none" fo:font-weight="bold" fo:background-color="transparent" style:font-size-asian="9.39999961853027pt" style:font-style-asian="normal" style:font-weight-asian="bold" style:font-size-complex="9.39999961853027pt" style:font-style-complex="normal" style:font-weight-complex="bold"/>
    </style:style>
    <style:style style:name="T8" style:family="text">
      <style:text-properties fo:font-variant="normal" fo:text-transform="none" fo:color="#0b1f33" loext:opacity="100%" style:text-outline="false" style:text-line-through-style="none" style:text-line-through-type="none" style:text-position="0% 100%" style:font-name="Aptos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variant="normal" fo:text-transform="none" fo:color="#617181" loext:opacity="100%" style:text-outline="false" style:text-line-through-style="none" style:text-line-through-type="none" style:text-position="0% 100%" style:font-name="Aptos1" fo:font-size="7.80000019073486pt" fo:letter-spacing="normal" fo:language="en" fo:country="US" fo:font-style="normal" style:text-underline-style="none" fo:font-weight="normal" fo:background-color="transparent" style:font-name-asian="Aptos2" style:font-size-asian="7.80000019073486pt" style:font-style-asian="normal" style:font-weight-asian="normal" style:font-name-complex="Aptos1" style:font-size-complex="7.80000019073486pt" style:font-style-complex="normal" style:font-weight-complex="normal"/>
    </style:style>
    <style:style style:name="T10" style:family="text">
      <style:text-properties fo:font-variant="normal" fo:text-transform="none" fo:color="#617181" loext:opacity="100%" style:text-outline="false" style:text-line-through-style="none" style:text-line-through-type="none" style:text-position="0% 100%" style:font-name="Aptos" fo:font-size="7.80000019073486pt" fo:letter-spacing="normal" fo:language="en" fo:country="US" fo:font-style="normal" style:text-underline-style="none" fo:font-weight="normal" fo:background-color="transparent" style:font-size-asian="7.80000019073486pt" style:font-style-asian="normal" style:font-weight-asian="normal" style:font-size-complex="7.8000001907348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b1f33" loext:opacity="100%" style:text-outline="false" style:text-line-through-style="none" style:text-line-through-type="none" style:text-position="0% 100%" style:font-name="Aptos Display" fo:font-size="25pt" fo:letter-spacing="normal" fo:language="en" fo:country="US" fo:font-style="normal" style:text-underline-style="none" fo:font-weight="bold" fo:background-color="transparent" style:font-name-asian="Aptos Display1" style:font-size-asian="25pt" style:font-style-asian="normal" style:font-weight-asian="bold" style:font-name-complex="Aptos Display" style:font-size-complex="25pt" style:font-style-complex="normal" style:font-weight-complex="bold"/>
    </style:style>
    <style:style style:name="T13" style:family="text">
      <style:text-properties fo:font-variant="normal" fo:text-transform="none" fo:color="#617181" loext:opacity="100%" style:text-outline="false" style:text-line-through-style="none" style:text-line-through-type="none" style:text-position="0% 100%" style:font-name="Aptos" fo:font-size="11.5pt" fo:letter-spacing="normal" fo:language="en" fo:country="US" fo:font-style="normal" style:text-underline-style="none" fo:font-weight="normal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T14" style:family="text">
      <style:text-properties fo:font-variant="normal" fo:text-transform="none" fo:color="#10a6a6" loext:opacity="100%" style:text-outline="false" style:text-line-through-style="none" style:text-line-through-type="none" style:text-position="0% 100%" style:font-name="Aptos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f2a43a" loext:opacity="100%" style:text-outline="false" style:text-line-through-style="none" style:text-line-through-type="none" style:text-position="0% 100%" style:font-name="Aptos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d74e4e" loext:opacity="100%" style:text-outline="false" style:text-line-through-style="none" style:text-line-through-type="none" style:text-position="0% 100%" style:font-name="Aptos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6.30000019073486pt" fo:letter-spacing="normal" fo:language="en" fo:country="US" fo:font-style="normal" style:text-underline-style="none" fo:font-weight="normal" fo:background-color="transparent" style:font-size-asian="6.30000019073486pt" style:font-style-asian="normal" style:font-weight-asian="normal" style:font-size-complex="6.30000019073486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6.30000019073486pt" fo:letter-spacing="normal" fo:language="en" fo:country="US" fo:font-style="normal" style:text-underline-style="none" fo:font-weight="normal" fo:background-color="transparent" style:font-size-asian="6.30000019073486pt" style:font-style-asian="normal" style:font-weight-asian="normal" style:font-size-complex="6.30000019073486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6.19999980926514pt" fo:letter-spacing="normal" fo:language="en" fo:country="US" fo:font-style="normal" style:text-underline-style="none" fo:font-weight="bold" fo:background-color="transparent" style:font-size-asian="6.19999980926514pt" style:font-style-asian="normal" style:font-weight-asian="bold" style:font-size-complex="6.19999980926514pt" style:font-style-complex="normal" style:font-weight-complex="bold"/>
    </style:style>
    <style:style style:name="T22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variant="normal" fo:text-transform="none" fo:color="#617181" loext:opacity="100%" style:text-outline="false" style:text-line-through-style="none" style:text-line-through-type="none" style:text-position="0% 100%" style:font-name="Aptos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24" style:family="text">
      <style:text-properties fo:font-variant="normal" fo:text-transform="none" fo:color="#0b1f33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fo:color="#10a6a6" loext:opacity="100%" style:text-outline="false" style:text-line-through-style="none" style:text-line-through-type="none" style:text-position="0% 100%" style:font-name="Aptos" fo:font-size="11.1999998092651pt" fo:letter-spacing="normal" fo:language="en" fo:country="US" fo:font-style="normal" style:text-underline-style="none" fo:font-weight="normal" fo:background-color="transparent" style:font-size-asian="11.1999998092651pt" style:font-style-asian="normal" style:font-weight-asian="normal" style:font-size-complex="11.1999998092651pt" style:font-style-complex="normal" style:font-weight-complex="normal"/>
    </style:style>
    <style:style style:name="T26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11.1999998092651pt" fo:letter-spacing="normal" fo:language="en" fo:country="US" fo:font-style="normal" style:text-underline-style="none" fo:font-weight="normal" fo:background-color="transparent" style:font-size-asian="11.1999998092651pt" style:font-style-asian="normal" style:font-weight-asian="normal" style:font-size-complex="11.1999998092651pt" style:font-style-complex="normal" style:font-weight-complex="normal"/>
    </style:style>
    <style:style style:name="T27" style:family="text">
      <style:text-properties fo:font-variant="normal" fo:text-transform="none" fo:color="#f2a43a" loext:opacity="100%" style:text-outline="false" style:text-line-through-style="none" style:text-line-through-type="none" style:text-position="0% 100%" style:font-name="Aptos" fo:font-size="11.1999998092651pt" fo:letter-spacing="normal" fo:language="en" fo:country="US" fo:font-style="normal" style:text-underline-style="none" fo:font-weight="normal" fo:background-color="transparent" style:font-size-asian="11.1999998092651pt" style:font-style-asian="normal" style:font-weight-asian="normal" style:font-size-complex="11.1999998092651pt" style:font-style-complex="normal" style:font-weight-complex="normal"/>
    </style:style>
    <style:style style:name="T28" style:family="text">
      <style:text-properties fo:font-variant="normal" fo:text-transform="none" fo:color="#29a36a" loext:opacity="100%" style:text-outline="false" style:text-line-through-style="none" style:text-line-through-type="none" style:text-position="0% 100%" style:font-name="Aptos" fo:font-size="11.1999998092651pt" fo:letter-spacing="normal" fo:language="en" fo:country="US" fo:font-style="normal" style:text-underline-style="none" fo:font-weight="normal" fo:background-color="transparent" style:font-size-asian="11.1999998092651pt" style:font-style-asian="normal" style:font-weight-asian="normal" style:font-size-complex="11.1999998092651pt" style:font-style-complex="normal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3.3000001907349pt" fo:letter-spacing="normal" fo:language="en" fo:country="US" fo:font-style="normal" style:text-underline-style="none" fo:font-weight="bold" fo:background-color="transparent" style:font-size-asian="13.3000001907349pt" style:font-style-asian="normal" style:font-weight-asian="bold" style:font-size-complex="13.3000001907349pt" style:font-style-complex="normal" style:font-weight-complex="bold"/>
    </style:style>
    <style:style style:name="T30" style:family="text">
      <style:text-properties fo:font-variant="normal" fo:text-transform="none" fo:color="#0b1f33" loext:opacity="100%" style:text-outline="false" style:text-line-through-style="none" style:text-line-through-type="none" style:text-position="0% 100%" style:font-name="Aptos" fo:font-size="13.5pt" fo:letter-spacing="normal" fo:language="en" fo:country="US" fo:font-style="normal" style:text-underline-style="none" fo:font-weight="bold" fo:background-color="transparent" style:font-size-asian="13.5pt" style:font-style-asian="normal" style:font-weight-asian="bold" style:font-size-complex="13.5pt" style:font-style-complex="normal" style:font-weight-complex="bold"/>
    </style:style>
    <style:style style:name="T31" style:family="text">
      <style:text-properties fo:font-variant="normal" fo:text-transform="none" fo:color="#10a6a6" loext:opacity="100%" style:text-outline="false" style:text-line-through-style="none" style:text-line-through-type="none" style:text-position="0% 100%" style:font-name="Aptos" fo:font-size="10.6999998092651pt" fo:letter-spacing="normal" fo:language="en" fo:country="US" fo:font-style="normal" style:text-underline-style="none" fo:font-weight="normal" fo:background-color="transparent" style:font-size-asian="10.6999998092651pt" style:font-style-asian="normal" style:font-weight-asian="normal" style:font-size-complex="10.6999998092651pt" style:font-style-complex="normal" style:font-weight-complex="normal"/>
    </style:style>
    <style:style style:name="T32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10.6999998092651pt" fo:letter-spacing="normal" fo:language="en" fo:country="US" fo:font-style="normal" style:text-underline-style="none" fo:font-weight="normal" fo:background-color="transparent" style:font-size-asian="10.6999998092651pt" style:font-style-asian="normal" style:font-weight-asian="normal" style:font-size-complex="10.6999998092651pt" style:font-style-complex="normal" style:font-weight-complex="normal"/>
    </style:style>
    <style:style style:name="T33" style:family="text">
      <style:text-properties fo:font-variant="normal" fo:text-transform="none" fo:color="#d74e4e" loext:opacity="100%" style:text-outline="false" style:text-line-through-style="none" style:text-line-through-type="none" style:text-position="0% 100%" style:font-name="Aptos" fo:font-size="10.6999998092651pt" fo:letter-spacing="normal" fo:language="en" fo:country="US" fo:font-style="normal" style:text-underline-style="none" fo:font-weight="normal" fo:background-color="transparent" style:font-size-asian="10.6999998092651pt" style:font-style-asian="normal" style:font-weight-asian="normal" style:font-size-complex="10.6999998092651pt" style:font-style-complex="normal" style:font-weight-complex="normal"/>
    </style:style>
    <style:style style:name="T34" style:family="text">
      <style:text-properties fo:font-variant="normal" fo:text-transform="none" fo:color="#617181" loext:opacity="100%" style:text-outline="false" style:text-line-through-style="none" style:text-line-through-type="none" style:text-position="0% 100%" style:font-name="Aptos" fo:font-size="9.80000019073486pt" fo:letter-spacing="normal" fo:language="en" fo:country="US" fo:font-style="normal" style:text-underline-style="none" fo:font-weight="normal" fo:background-color="transparent" style:font-size-asian="9.80000019073486pt" style:font-style-asian="normal" style:font-weight-asian="normal" style:font-size-complex="9.80000019073486pt" style:font-style-complex="normal" style:font-weight-complex="normal"/>
    </style:style>
    <style:style style:name="T35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12.3000001907349pt" fo:letter-spacing="normal" fo:language="en" fo:country="US" fo:font-style="normal" style:text-underline-style="none" fo:font-weight="bold" fo:background-color="transparent" style:font-size-asian="12.3000001907349pt" style:font-style-asian="normal" style:font-weight-asian="bold" style:font-size-complex="12.3000001907349pt" style:font-style-complex="normal" style:font-weight-complex="bold"/>
    </style:style>
    <style:style style:name="T36" style:family="text">
      <style:text-properties fo:font-variant="normal" fo:text-transform="none" fo:color="#f2a43a" loext:opacity="100%" style:text-outline="false" style:text-line-through-style="none" style:text-line-through-type="none" style:text-position="0% 100%" style:font-name="Aptos" fo:font-size="10.6999998092651pt" fo:letter-spacing="normal" fo:language="en" fo:country="US" fo:font-style="normal" style:text-underline-style="none" fo:font-weight="normal" fo:background-color="transparent" style:font-size-asian="10.6999998092651pt" style:font-style-asian="normal" style:font-weight-asian="normal" style:font-size-complex="10.6999998092651pt" style:font-style-complex="normal" style:font-weight-complex="normal"/>
    </style:style>
    <style:style style:name="T37" style:family="text">
      <style:text-properties fo:font-variant="normal" fo:text-transform="none" fo:color="#29a36a" loext:opacity="100%" style:text-outline="false" style:text-line-through-style="none" style:text-line-through-type="none" style:text-position="0% 100%" style:font-name="Aptos" fo:font-size="10.6999998092651pt" fo:letter-spacing="normal" fo:language="en" fo:country="US" fo:font-style="normal" style:text-underline-style="none" fo:font-weight="normal" fo:background-color="transparent" style:font-size-asian="10.6999998092651pt" style:font-style-asian="normal" style:font-weight-asian="normal" style:font-size-complex="10.6999998092651pt" style:font-style-complex="normal" style:font-weight-complex="normal"/>
    </style:style>
    <style:style style:name="T38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11.5pt" fo:letter-spacing="normal" fo:language="en" fo:country="US" fo:font-style="normal" style:text-underline-style="none" fo:font-weight="bold" fo:background-color="transparent" style:font-size-asian="11.5pt" style:font-style-asian="normal" style:font-weight-asian="bold" style:font-size-complex="11.5pt" style:font-style-complex="normal" style:font-weight-complex="bold"/>
    </style:style>
    <style:style style:name="T39" style:family="text">
      <style:text-properties fo:font-variant="normal" fo:text-transform="none" fo:color="#145da0" loext:opacity="100%" style:text-outline="false" style:text-line-through-style="none" style:text-line-through-type="none" style:text-position="0% 100%" style:font-name="Aptos" fo:font-size="10.1999998092651pt" fo:letter-spacing="normal" fo:language="en" fo:country="US" fo:font-style="normal" style:text-underline-style="none" fo:font-weight="normal" fo:background-color="transparent" style:font-size-asian="10.1999998092651pt" style:font-style-asian="normal" style:font-weight-asian="normal" style:font-size-complex="10.1999998092651pt" style:font-style-complex="normal" style:font-weight-complex="normal"/>
    </style:style>
    <style:style style:name="T40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10.1999998092651pt" fo:letter-spacing="normal" fo:language="en" fo:country="US" fo:font-style="normal" style:text-underline-style="none" fo:font-weight="normal" fo:background-color="transparent" style:font-size-asian="10.1999998092651pt" style:font-style-asian="normal" style:font-weight-asian="normal" style:font-size-complex="10.1999998092651pt" style:font-style-complex="normal" style:font-weight-complex="normal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42" style:family="text">
      <style:text-properties fo:font-variant="normal" fo:text-transform="none" fo:color="#0b1f33" loext:opacity="100%" style:text-outline="false" style:text-line-through-style="none" style:text-line-through-type="none" style:text-position="0% 100%" style:font-name="Aptos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44" style:family="text">
      <style:text-properties fo:font-variant="normal" fo:text-transform="none" fo:color="#617181" loext:opacity="100%" style:text-outline="false" style:text-line-through-style="none" style:text-line-through-type="none" style:text-position="0% 100%" style:font-name="Aptos" fo:font-size="8.80000019073486pt" fo:letter-spacing="normal" fo:language="en" fo:country="US" fo:font-style="normal" style:text-underline-style="none" fo:font-weight="normal" fo:background-color="transparent" style:font-size-asian="8.80000019073486pt" style:font-style-asian="normal" style:font-weight-asian="normal" style:font-size-complex="8.80000019073486pt" style:font-style-complex="normal" style:font-weight-complex="normal"/>
    </style:style>
    <style:style style:name="T45" style:family="text">
      <style:text-properties fo:font-variant="normal" fo:text-transform="none" fo:color="#0b1f33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2.3000001907349pt" fo:letter-spacing="normal" fo:language="en" fo:country="US" fo:font-style="normal" style:text-underline-style="none" fo:font-weight="bold" fo:background-color="transparent" style:font-size-asian="12.3000001907349pt" style:font-style-asian="normal" style:font-weight-asian="bold" style:font-size-complex="12.3000001907349pt" style:font-style-complex="normal" style:font-weight-complex="bold"/>
    </style:style>
    <style:style style:name="T47" style:family="text">
      <style:text-properties fo:font-variant="normal" fo:text-transform="none" fo:color="#29a36a" loext:opacity="100%" style:text-outline="false" style:text-line-through-style="none" style:text-line-through-type="none" style:text-position="0% 100%" style:font-name="Aptos" fo:font-size="10.8999996185303pt" fo:letter-spacing="normal" fo:language="en" fo:country="US" fo:font-style="normal" style:text-underline-style="none" fo:font-weight="normal" fo:background-color="transparent" style:font-size-asian="10.8999996185303pt" style:font-style-asian="normal" style:font-weight-asian="normal" style:font-size-complex="10.8999996185303pt" style:font-style-complex="normal" style:font-weight-complex="normal"/>
    </style:style>
    <style:style style:name="T48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10.8999996185303pt" fo:letter-spacing="normal" fo:language="en" fo:country="US" fo:font-style="normal" style:text-underline-style="none" fo:font-weight="normal" fo:background-color="transparent" style:font-size-asian="10.8999996185303pt" style:font-style-asian="normal" style:font-weight-asian="normal" style:font-size-complex="10.8999996185303pt" style:font-style-complex="normal" style:font-weight-complex="normal"/>
    </style:style>
    <style:style style:name="T49" style:family="text">
      <style:text-properties fo:font-variant="normal" fo:text-transform="none" fo:color="#d74e4e" loext:opacity="100%" style:text-outline="false" style:text-line-through-style="none" style:text-line-through-type="none" style:text-position="0% 100%" style:font-name="Aptos" fo:font-size="10.8999996185303pt" fo:letter-spacing="normal" fo:language="en" fo:country="US" fo:font-style="normal" style:text-underline-style="none" fo:font-weight="normal" fo:background-color="transparent" style:font-size-asian="10.8999996185303pt" style:font-style-asian="normal" style:font-weight-asian="normal" style:font-size-complex="10.8999996185303pt" style:font-style-complex="normal" style:font-weight-complex="normal"/>
    </style:style>
    <style:style style:name="T50" style:family="text">
      <style:text-properties fo:font-variant="normal" fo:text-transform="none" fo:color="#1d2a36" loext:opacity="100%" style:text-outline="false" style:text-line-through-style="none" style:text-line-through-type="none" style:text-position="0% 100%" style:font-name="Aptos" fo:font-size="9.69999980926514pt" fo:letter-spacing="normal" fo:language="en" fo:country="US" fo:font-style="normal" style:text-underline-style="none" fo:font-weight="normal" fo:background-color="transparent" style:font-size-asian="9.69999980926514pt" style:font-style-asian="normal" style:font-weight-asian="normal" style:font-size-complex="9.6999998092651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9.69999980926514pt" fo:letter-spacing="normal" fo:language="en" fo:country="US" fo:font-style="normal" style:text-underline-style="none" fo:font-weight="normal" fo:background-color="transparent" style:font-size-asian="9.69999980926514pt" style:font-style-asian="normal" style:font-weight-asian="normal" style:font-size-complex="9.69999980926514pt" style:font-style-complex="normal" style:font-weight-complex="normal">
        <loext:char-complex-color loext:theme-type="dark1" loext:color-type="theme"/>
      </style:text-properties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4.5pt" fo:letter-spacing="normal" fo:font-style="normal" style:text-underline-style="none" fo:font-weight="bold" fo:background-color="transparent" style:font-size-asian="14.5pt" style:font-style-asian="normal" style:font-weight-asian="bold" style:font-size-complex="14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b1f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45d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d2a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6171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0a6a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2a43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d74e4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9a3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Shape 0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0.40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4" draw:layer="layout" svg:width="6.095cm" svg:height="0.812cm" svg:x="1.575cm" svg:y="1.27cm">
          <text:p text:style-name="P3"><text:span text:style-name="T1">FINAL PRESENTA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6" draw:layer="layout" svg:width="14.477cm" svg:height="1.396cm" svg:x="1.575cm" svg:y="2.591cm">
          <text:p text:style-name="P5"><text:span text:style-name="T2">D</text:span><text:span text:style-name="T2">4</text:span><text:span text:style-name="T2">-</text:span><text:span text:style-name="T2">V</text:span><text:span text:style-name="T2">2</text:span><text:span text:style-name="T2"> 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s</text:span><text:span text:style-name="T2">c</text:span><text:span text:style-name="T2">u</text:span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6" draw:layer="layout" svg:width="13.207cm" svg:height="0.939cm" svg:x="1.626cm" svg:y="4.115cm">
          <text:p text:style-name="P5"><text:span text:style-name="T3">Unknown Victim 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6" draw:layer="layout" svg:width="13.969cm" svg:height="2.539cm" svg:x="1.676cm" svg:y="5.537cm">
          <text:p text:style-name="P5"><text:span text:style-name="T4">A </text:span><text:span text:style-name="T4">re</text:span><text:span text:style-name="T4">sc</text:span><text:span text:style-name="T4">u</text:span><text:span text:style-name="T4">e </text:span><text:span text:style-name="T4">ro</text:span><text:span text:style-name="T4">b</text:span><text:span text:style-name="T4">ot </text:span><text:span text:style-name="T4">e</text:span><text:span text:style-name="T4">x</text:span><text:span text:style-name="T4">pl</text:span><text:span text:style-name="T4">or</text:span><text:span text:style-name="T4">es </text:span><text:span text:style-name="T4">a </text:span><text:span text:style-name="T4">k</text:span><text:span text:style-name="T4">n</text:span><text:span text:style-name="T4">o</text:span><text:span text:style-name="T4">w</text:span><text:span text:style-name="T4">n </text:span><text:span text:style-name="T4">to</text:span><text:span text:style-name="T4">p</text:span><text:span text:style-name="T4">ol</text:span><text:span text:style-name="T4">o</text:span><text:span text:style-name="T4">g</text:span><text:span text:style-name="T4">y, </text:span><text:span text:style-name="T4">in</text:span><text:span text:style-name="T4">s</text:span><text:span text:style-name="T4">p</text:span><text:span text:style-name="T4">ec</text:span><text:span text:style-name="T4">ts </text:span><text:span text:style-name="T4">ro</text:span><text:span text:style-name="T4">o</text:span><text:span text:style-name="T4">m</text:span><text:span text:style-name="T4">s, </text:span><text:span text:style-name="T4">d</text:span><text:span text:style-name="T4">et</text:span><text:span text:style-name="T4">ec</text:span><text:span text:style-name="T4">ts </text:span><text:span text:style-name="T4">th</text:span><text:span text:style-name="T4">e </text:span><text:span text:style-name="T4">vi</text:span><text:span text:style-name="T4">ct</text:span><text:span text:style-name="T4">i</text:span><text:span text:style-name="T4">m</text:span><text:span text:style-name="T4">, </text:span><text:span text:style-name="T4">a</text:span><text:span text:style-name="T4">n</text:span><text:span text:style-name="T4">d </text:span><text:span text:style-name="T4">c</text:span><text:span text:style-name="T4">o</text:span><text:span text:style-name="T4">m</text:span><text:span text:style-name="T4">pl</text:span><text:span text:style-name="T4">et</text:span><text:span text:style-name="T4">es </text:span><text:span text:style-name="T4">re</text:span><text:span text:style-name="T4">sc</text:span><text:span text:style-name="T4">u</text:span><text:span text:style-name="T4">e </text:span><text:span text:style-name="T4">b</text:span><text:span text:style-name="T4">ef</text:span><text:span text:style-name="T4">or</text:span><text:span text:style-name="T4">e </text:span><text:span text:style-name="T4">ti</text:span><text:span text:style-name="T4">m</text:span><text:span text:style-name="T4">e-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t </text:span><text:span text:style-name="T4">h</text:span><text:span text:style-name="T4">e</text:span><text:span text:style-name="T4">al</text:span><text:span text:style-name="T4">th </text:span><text:span text:style-name="T4">d</text:span><text:span text:style-name="T4">e</text:span><text:span text:style-name="T4">gr</text:span><text:span text:style-name="T4">a</text:span><text:span text:style-name="T4">d</text:span><text:span text:style-name="T4">at</text:span><text:span text:style-name="T4">io</text:span><text:span text:style-name="T4">n </text:span><text:span text:style-name="T4">m</text:span><text:span text:style-name="T4">a</text:span><text:span text:style-name="T4">k</text:span><text:span text:style-name="T4">es </text:span><text:span text:style-name="T4">th</text:span><text:span text:style-name="T4">e </text:span><text:span text:style-name="T4">m</text:span><text:span text:style-name="T4">is</text:span><text:span text:style-name="T4">si</text:span><text:span text:style-name="T4">o</text:span><text:span text:style-name="T4">n </text:span><text:span text:style-name="T4">fa</text:span><text:span text:style-name="T4">i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" draw:style-name="gr7" draw:text-style-name="P7" draw:layer="layout" svg:x1="19.254cm" svg:y1="6.825cm" svg:x2="22.7cm" svg:y2="6.826cm">
          <text:p/>
        </draw:line>
        <draw:line draw:name="Shape 7" draw:style-name="gr7" draw:text-style-name="P7" draw:layer="layout" svg:x1="22.7cm" svg:y1="6.825cm" svg:x2="26.147cm" svg:y2="4.727cm">
          <text:p/>
        </draw:line>
        <draw:line draw:name="Shape 8" draw:style-name="gr7" draw:text-style-name="P7" draw:layer="layout" svg:x1="22.7cm" svg:y1="6.825cm" svg:x2="26.147cm" svg:y2="8.924cm">
          <text:p/>
        </draw:line>
        <draw:line draw:name="Shape 9" draw:style-name="gr7" draw:text-style-name="P7" draw:layer="layout" svg:x1="26.147cm" svg:y1="4.727cm" svg:x2="29.594cm" svg:y2="6.825cm">
          <text:p/>
        </draw:line>
        <draw:line draw:name="Shape 10" draw:style-name="gr7" draw:text-style-name="P7" draw:layer="layout" svg:x1="26.147cm" svg:y1="8.924cm" svg:x2="29.594cm" svg:y2="6.825cm">
          <text:p/>
        </draw:line>
        <draw:line draw:name="Shape 11" draw:style-name="gr7" draw:text-style-name="P7" draw:layer="layout" svg:x1="19.404cm" svg:y1="3.828cm" svg:x2="19.254cm" svg:y2="6.825cm">
          <text:p/>
        </draw:line>
        <draw:custom-shape draw:name="Text 12" draw:style-name="gr8" draw:text-style-name="P8" draw:layer="layout" svg:width="2.157cm" svg:height="1.018cm" svg:x="18.415cm" svg:y="5.987cm">
          <text:p text:style-name="P3"><text:span text:style-name="T5">ent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9" draw:text-style-name="P8" draw:layer="layout" svg:width="2.157cm" svg:height="1.018cm" svg:x="21.862cm" svg:y="5.987cm">
          <text:p text:style-name="P3"><text:span text:style-name="T5">corri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" draw:text-style-name="P8" draw:layer="layout" svg:width="2.157cm" svg:height="1.018cm" svg:x="25.309cm" svg:y="3.889cm">
          <text:p text:style-name="P3"><text:span text:style-name="T5">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" draw:text-style-name="P8" draw:layer="layout" svg:width="2.157cm" svg:height="1.018cm" svg:x="25.309cm" svg:y="8.085cm">
          <text:p text:style-name="P3"><text:span text:style-name="T5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2" draw:text-style-name="P9" draw:layer="layout" svg:width="2.157cm" svg:height="1.018cm" svg:x="28.755cm" svg:y="5.987cm">
          <text:p text:style-name="P3"><text:span text:style-name="T5">infir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10" draw:layer="layout" svg:width="2.157cm" svg:height="1.018cm" svg:x="18.565cm" svg:y="2.99cm">
          <text:p text:style-name="P3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" draw:text-style-name="P11" draw:layer="layout" svg:width="0.958cm" svg:height="0.748cm" svg:x="29.565cm" svg:y="4.788cm">
          <text:p text:style-name="P3"><text:span text:style-name="T7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" draw:text-style-name="P12" draw:layer="layout" svg:width="18.922cm" svg:height="1.726cm" svg:x="1.727cm" svg:y="13.919cm">
          <text:p text:style-name="P5"><text:span text:style-name="T8">Proble</text:span><text:span text:style-name="T8">m </text:span><text:span text:style-name="T8">overvi</text:span><text:span text:style-name="T8">ew → </text:span><text:span text:style-name="T8">classic</text:span><text:span text:style-name="T8">al </text:span><text:span text:style-name="T8">abstra</text:span><text:span text:style-name="T8">ction → </text:span><text:span text:style-name="T8">PDDL+ </text:span><text:span text:style-name="T8">dynam</text:span><text:span text:style-name="T8">ics → </text:span><text:span text:style-name="T8">model </text:span><text:span text:style-name="T8">evoluti</text:span><text:span text:style-name="T8">on → </text:span><text:span text:style-name="T8">validat</text:span><text:span text:style-name="T8">ion → </text:span><text:span text:style-name="T8">limitat</text:span><text:span text:style-name="T8">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1" draw:style-name="gr16" draw:text-style-name="P7" draw:layer="layout" svg:x1="1.397cm" svg:y1="17.907cm" svg:x2="32.512cm" svg:y2="17.908cm">
          <text:p/>
        </draw:line>
        <draw:custom-shape draw:name="Text 22" draw:style-name="gr17" draw:text-style-name="P6" draw:layer="layout" svg:width="12.191cm" svg:height="0.558cm" svg:x="1.524cm" svg:y="18.085cm">
          <text:p text:style-name="P5"><text:span text:style-name="T9">AI2 </text:span><text:span text:style-name="T9">Assignment </text:span><text:span text:style-name="T9">D4-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8" draw:text-style-name="P14" draw:layer="layout" svg:width="1.904cm" svg:height="0.558cm" svg:x="30.48cm" svg:y="18.085cm">
          <text:p text:style-name="P13"><text:span text:style-name="T10">1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1" presentation:class="page"/>
          <draw:frame draw:name="Notes Placeholder 2" presentation:style-name="pr1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20" draw:text-style-name="P18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1" draw:text-style-name="P19" draw:layer="layout" svg:width="0.40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2" draw:text-style-name="P6" draw:layer="layout" svg:width="25.145cm" svg:height="1.32cm" svg:x="1.575cm" svg:y="0.965cm">
          <text:p text:style-name="P5"><text:span text:style-name="T12">Cor</text:span><text:span text:style-name="T12">e </text:span><text:span text:style-name="T12">mo</text:span><text:span text:style-name="T12">dell</text:span><text:span text:style-name="T12">ing </text:span><text:span text:style-name="T12">pro</text:span><text:span text:style-name="T12">ble</text:span><text:span text:style-name="T1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3" draw:text-style-name="P6" draw:layer="layout" svg:width="26.923cm" svg:height="0.863cm" svg:x="1.626cm" svg:y="2.388cm">
          <text:p text:style-name="P5"><text:span text:style-name="T13">Unknow</text:span><text:span text:style-name="T13">n victim </text:span><text:span text:style-name="T13">location </text:span><text:span text:style-name="T13">forces </text:span><text:span text:style-name="T13">the </text:span><text:span text:style-name="T13">model to </text:span><text:span text:style-name="T13">represen</text:span><text:span text:style-name="T13">t </text:span><text:span text:style-name="T13">informati</text:span><text:span text:style-name="T13">on </text:span><text:span text:style-name="T13">acquisiti</text:span><text:span text:style-name="T13">on </text:span><text:span text:style-name="T13">explicit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" draw:style-name="gr24" draw:text-style-name="P20" draw:layer="layout" svg:x1="1.397cm" svg:y1="17.907cm" svg:x2="32.512cm" svg:y2="17.908cm">
          <text:p/>
        </draw:line>
        <draw:custom-shape draw:name="Text 5" draw:style-name="gr25" draw:text-style-name="P6" draw:layer="layout" svg:width="12.191cm" svg:height="0.558cm" svg:x="1.524cm" svg:y="18.085cm">
          <text:p text:style-name="P5"><text:span text:style-name="T9">AI2 </text:span><text:span text:style-name="T9">Assignment </text:span><text:span text:style-name="T9">D4-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6" draw:text-style-name="P14" draw:layer="layout" svg:width="1.904cm" svg:height="0.558cm" svg:x="30.48cm" svg:y="18.085cm">
          <text:p text:style-name="P13"><text:span text:style-name="T10">2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7" draw:text-style-name="P9" draw:layer="layout" svg:width="7.619cm" svg:height="1.32cm" svg:x="2.083cm" svg:y="4.191cm">
          <text:p text:style-name="P3"><text:span text:style-name="T8">What the robot kn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8" draw:text-style-name="P6" draw:layer="layout" svg:width="0.456cm" svg:height="0.507cm" svg:x="2.413cm" svg:y="6.147cm">
          <text:p text:style-name="P5"><text:span text:style-name="T14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9" draw:text-style-name="P6" draw:layer="layout" svg:width="6.349cm" svg:height="0.863cm" svg:x="2.997cm" svg:y="6.147cm">
          <text:p text:style-name="P5"><text:span text:style-name="T15">The topology is know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0" draw:text-style-name="P6" draw:layer="layout" svg:width="0.456cm" svg:height="0.507cm" svg:x="2.413cm" svg:y="7.468cm">
          <text:p text:style-name="P5"><text:span text:style-name="T14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1" draw:text-style-name="P6" draw:layer="layout" svg:width="6.603cm" svg:height="1.218cm" svg:x="2.997cm" svg:y="7.468cm">
          <text:p text:style-name="P5"><text:span text:style-name="T15">The victim room is not given in the exploration probl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2" draw:text-style-name="P21" draw:layer="layout" svg:width="7.619cm" svg:height="1.32cm" svg:x="13.005cm" svg:y="4.191cm">
          <text:p text:style-name="P3"><text:span text:style-name="T8">What the robot must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3" draw:text-style-name="P6" draw:layer="layout" svg:width="0.456cm" svg:height="0.507cm" svg:x="13.335cm" svg:y="6.147cm">
          <text:p text:style-name="P5"><text:span text:style-name="T16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4" draw:text-style-name="P6" draw:layer="layout" svg:width="6.349cm" svg:height="0.863cm" svg:x="13.919cm" svg:y="6.147cm">
          <text:p text:style-name="P5"><text:span text:style-name="T15">Move through roo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5" draw:text-style-name="P6" draw:layer="layout" svg:width="0.456cm" svg:height="0.507cm" svg:x="13.335cm" svg:y="7.468cm">
          <text:p text:style-name="P5"><text:span text:style-name="T16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6" draw:text-style-name="P6" draw:layer="layout" svg:width="6.857cm" svg:height="0.863cm" svg:x="13.919cm" svg:y="7.468cm">
          <text:p text:style-name="P5"><text:span text:style-name="T15">Inspect candidate roo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7" draw:text-style-name="P6" draw:layer="layout" svg:width="0.456cm" svg:height="0.507cm" svg:x="13.335cm" svg:y="8.788cm">
          <text:p text:style-name="P5"><text:span text:style-name="T16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8" draw:text-style-name="P6" draw:layer="layout" svg:width="7.111cm" svg:height="0.863cm" svg:x="13.919cm" svg:y="8.788cm">
          <text:p text:style-name="P5"><text:span text:style-name="T15">Rescue only after dete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9" draw:text-style-name="P22" draw:layer="layout" svg:width="7.619cm" svg:height="1.32cm" svg:x="23.927cm" svg:y="4.191cm">
          <text:p text:style-name="P3"><text:span text:style-name="T8">What changes with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0" draw:text-style-name="P6" draw:layer="layout" svg:width="0.456cm" svg:height="0.507cm" svg:x="24.257cm" svg:y="6.147cm">
          <text:p text:style-name="P5"><text:span text:style-name="T17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1" draw:text-style-name="P6" draw:layer="layout" svg:width="6.349cm" svg:height="0.863cm" svg:x="24.841cm" svg:y="6.147cm">
          <text:p text:style-name="P5"><text:span text:style-name="T15">Victim health degra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2" draw:text-style-name="P6" draw:layer="layout" svg:width="0.456cm" svg:height="0.507cm" svg:x="24.257cm" svg:y="7.468cm">
          <text:p text:style-name="P5"><text:span text:style-name="T17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43" draw:text-style-name="P6" draw:layer="layout" svg:width="6.603cm" svg:height="1.218cm" svg:x="24.841cm" svg:y="7.468cm">
          <text:p text:style-name="P5"><text:span text:style-name="T15">Long exploration can make rescue impossi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4" draw:style-name="gr44" draw:text-style-name="P20" draw:layer="layout" svg:x1="10.033cm" svg:y1="8.051cm" svg:x2="12.242cm" svg:y2="8.052cm">
          <text:p/>
        </draw:line>
        <draw:line draw:name="Shape 25" draw:style-name="gr44" draw:text-style-name="P20" draw:layer="layout" svg:x1="20.955cm" svg:y1="8.051cm" svg:x2="23.164cm" svg:y2="8.052cm">
          <text:p/>
        </draw:line>
        <draw:custom-shape draw:name="Text 26" draw:style-name="gr45" draw:text-style-name="P10" draw:layer="layout" svg:width="27.812cm" svg:height="1.65cm" svg:x="2.997cm" svg:y="13.411cm">
          <text:p text:style-name="P3"><text:span text:style-name="T18">Key modelling choice: treat sensing as explicit symbolic actions in Q1, then add time-dependent health dynamics in Q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2" presentation:class="page"/>
          <draw:frame draw:name="Notes Placeholder 2" presentation:style-name="pr3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20" draw:text-style-name="P18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1" draw:text-style-name="P19" draw:layer="layout" svg:width="0.40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6" draw:text-style-name="P6" draw:layer="layout" svg:width="25.145cm" svg:height="1.32cm" svg:x="1.575cm" svg:y="0.965cm">
          <text:p text:style-name="P5"><text:span text:style-name="T12">Q1 — Classical PDDL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7" draw:text-style-name="P6" draw:layer="layout" svg:width="26.923cm" svg:height="0.863cm" svg:x="1.626cm" svg:y="2.388cm">
          <text:p text:style-name="P5"><text:span text:style-name="T13">Classical PDDL provides a valid abstraction, not real partial observabil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" draw:style-name="gr24" draw:text-style-name="P20" draw:layer="layout" svg:x1="1.397cm" svg:y1="17.907cm" svg:x2="32.512cm" svg:y2="17.908cm">
          <text:p/>
        </draw:line>
        <draw:custom-shape draw:name="Text 5" draw:style-name="gr48" draw:text-style-name="P6" draw:layer="layout" svg:width="12.191cm" svg:height="0.558cm" svg:x="1.524cm" svg:y="18.085cm">
          <text:p text:style-name="P5"><text:span text:style-name="T9">AI2 Assignment D4-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9" draw:text-style-name="P14" draw:layer="layout" svg:width="1.904cm" svg:height="0.558cm" svg:x="30.48cm" svg:y="18.085cm">
          <text:p text:style-name="P13"><text:span text:style-name="T10">3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7" draw:style-name="gr50" draw:text-style-name="P20" draw:layer="layout" svg:x1="2.758cm" svg:y1="7.387cm" svg:x2="5.533cm" svg:y2="7.388cm">
          <text:p/>
        </draw:line>
        <draw:line draw:name="Shape 8" draw:style-name="gr50" draw:text-style-name="P20" draw:layer="layout" svg:x1="5.533cm" svg:y1="7.387cm" svg:x2="8.308cm" svg:y2="5.698cm">
          <text:p/>
        </draw:line>
        <draw:line draw:name="Shape 9" draw:style-name="gr50" draw:text-style-name="P20" draw:layer="layout" svg:x1="5.533cm" svg:y1="7.387cm" svg:x2="8.308cm" svg:y2="9.076cm">
          <text:p/>
        </draw:line>
        <draw:line draw:name="Shape 10" draw:style-name="gr50" draw:text-style-name="P20" draw:layer="layout" svg:x1="8.308cm" svg:y1="5.698cm" svg:x2="11.083cm" svg:y2="7.387cm">
          <text:p/>
        </draw:line>
        <draw:line draw:name="Shape 11" draw:style-name="gr50" draw:text-style-name="P20" draw:layer="layout" svg:x1="8.308cm" svg:y1="9.076cm" svg:x2="11.083cm" svg:y2="7.387cm">
          <text:p/>
        </draw:line>
        <draw:line draw:name="Shape 12" draw:style-name="gr50" draw:text-style-name="P20" draw:layer="layout" svg:x1="2.879cm" svg:y1="4.974cm" svg:x2="2.758cm" svg:y2="7.387cm">
          <text:p/>
        </draw:line>
        <draw:custom-shape draw:name="Text 13" draw:style-name="gr51" draw:text-style-name="P8" draw:layer="layout" svg:width="1.736cm" svg:height="0.819cm" svg:x="2.083cm" svg:y="6.712cm">
          <text:p text:style-name="P3"><text:span text:style-name="T19">ent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2" draw:text-style-name="P8" draw:layer="layout" svg:width="1.736cm" svg:height="0.819cm" svg:x="4.858cm" svg:y="6.712cm">
          <text:p text:style-name="P3"><text:span text:style-name="T19">corri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53" draw:text-style-name="P8" draw:layer="layout" svg:width="1.736cm" svg:height="0.819cm" svg:x="7.633cm" svg:y="5.023cm">
          <text:p text:style-name="P3"><text:span text:style-name="T19">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4" draw:text-style-name="P8" draw:layer="layout" svg:width="1.736cm" svg:height="0.819cm" svg:x="7.633cm" svg:y="8.401cm">
          <text:p text:style-name="P3"><text:span text:style-name="T19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5" draw:text-style-name="P9" draw:layer="layout" svg:width="1.736cm" svg:height="0.819cm" svg:x="10.408cm" svg:y="6.712cm">
          <text:p text:style-name="P3"><text:span text:style-name="T19">infir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6" draw:text-style-name="P10" draw:layer="layout" svg:width="1.736cm" svg:height="0.819cm" svg:x="2.203cm" svg:y="4.299cm">
          <text:p text:style-name="P3"><text:span text:style-name="T20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57" draw:text-style-name="P23" draw:layer="layout" svg:width="1.64cm" svg:height="0.554cm" svg:x="10.842cm" svg:y="5.747cm">
          <text:p text:style-name="P3"><text:span text:style-name="T21">vict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8" draw:text-style-name="P8" draw:layer="layout" svg:width="3.301cm" svg:height="1.167cm" svg:x="15.24cm" svg:y="4.191cm">
          <text:p text:style-name="P3"><text:span text:style-name="T22">mo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9" draw:text-style-name="P8" draw:layer="layout" svg:width="3.301cm" svg:height="1.167cm" svg:x="19.431cm" svg:y="4.191cm">
          <text:p text:style-name="P3"><text:span text:style-name="T22">insp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60" draw:text-style-name="P8" draw:layer="layout" svg:width="3.301cm" svg:height="1.167cm" svg:x="23.622cm" svg:y="4.191cm">
          <text:p text:style-name="P3"><text:span text:style-name="T22">det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61" draw:text-style-name="P8" draw:layer="layout" svg:width="3.301cm" svg:height="1.167cm" svg:x="27.813cm" svg:y="4.191cm">
          <text:p text:style-name="P3"><text:span text:style-name="T22">resc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4" draw:style-name="gr62" draw:text-style-name="P20" draw:layer="layout" svg:x1="18.592cm" svg:y1="4.775cm" svg:x2="19.253cm" svg:y2="4.776cm">
          <text:p/>
        </draw:line>
        <draw:line draw:name="Shape 25" draw:style-name="gr62" draw:text-style-name="P20" draw:layer="layout" svg:x1="22.783cm" svg:y1="4.775cm" svg:x2="23.444cm" svg:y2="4.776cm">
          <text:p/>
        </draw:line>
        <draw:line draw:name="Shape 26" draw:style-name="gr62" draw:text-style-name="P20" draw:layer="layout" svg:x1="26.974cm" svg:y1="4.775cm" svg:x2="27.635cm" svg:y2="4.776cm">
          <text:p/>
        </draw:line>
        <draw:custom-shape draw:name="Text 27" draw:style-name="gr63" draw:text-style-name="P6" draw:layer="layout" svg:width="11.429cm" svg:height="0.71cm" svg:x="15.291cm" svg:y="3.251cm">
          <text:p text:style-name="P5"><text:span text:style-name="T23">Symbolic information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64" draw:text-style-name="P9" draw:layer="layout" svg:width="7.619cm" svg:height="1.269cm" svg:x="15.494cm" svg:y="6.909cm">
          <text:p text:style-name="P3"><text:span text:style-name="T24">rescue depends on victim-det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65" draw:text-style-name="P22" draw:layer="layout" svg:width="7.238cm" svg:height="1.269cm" svg:x="24.511cm" svg:y="6.909cm">
          <text:p text:style-name="P3"><text:span text:style-name="T24">direct rescue is blo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66" draw:text-style-name="P6" draw:layer="layout" svg:width="0.456cm" svg:height="0.507cm" svg:x="15.494cm" svg:y="9.271cm">
          <text:p text:style-name="P5"><text:span text:style-name="T25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67" draw:text-style-name="P6" draw:layer="layout" svg:width="14.477cm" svg:height="0.863cm" svg:x="16.078cm" svg:y="9.271cm">
          <text:p text:style-name="P5"><text:span text:style-name="T26">Rooms become inspectable symbolic st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68" draw:text-style-name="P6" draw:layer="layout" svg:width="0.456cm" svg:height="0.507cm" svg:x="15.494cm" svg:y="10.592cm">
          <text:p text:style-name="P5"><text:span text:style-name="T27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69" draw:text-style-name="P6" draw:layer="layout" svg:width="14.985cm" svg:height="0.863cm" svg:x="16.078cm" svg:y="10.592cm">
          <text:p text:style-name="P5"><text:span text:style-name="T26">The planner does not access hidden uncertainty direct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70" draw:text-style-name="P6" draw:layer="layout" svg:width="0.456cm" svg:height="0.507cm" svg:x="15.494cm" svg:y="11.913cm">
          <text:p text:style-name="P5"><text:span text:style-name="T28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71" draw:text-style-name="P6" draw:layer="layout" svg:width="14.731cm" svg:height="0.863cm" svg:x="16.078cm" svg:y="11.913cm">
          <text:p text:style-name="P5"><text:span text:style-name="T26">Detection changes the state, enabling the rescue a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72" draw:text-style-name="P10" draw:layer="layout" svg:width="29.717cm" svg:height="1.32cm" svg:x="2.083cm" svg:y="14.554cm">
          <text:p text:style-name="P3"><text:span text:style-name="T29">Presentation answer: Q1 approximates unknown location by making inspection and detection explicit in the domain mod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3" presentation:class="page"/>
          <draw:frame draw:name="Notes Placeholder 2" presentation:style-name="pr4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page4" draw:style-name="dp3" draw:master-page-name="Blank" presentation:presentation-page-layout-name="AL1T0">
        <draw:frame draw:name="Picture 2" draw:style-name="gr73" draw:text-style-name="P20" draw:layer="layout" svg:width="33.865cm" svg:height="19.049cm" svg:x="0cm" svg:y="0cm">
          <draw:image xlink:href="Pictures/1000000000000640000003847D94F618.png" xlink:type="simple" xlink:show="embed" xlink:actuate="onLoad" draw:mime-type="image/png">
            <text:p/>
          </draw:image>
          <svg:desc>slide4_regenerated_v8.png</svg:desc>
        </draw:frame>
        <presentation:notes draw:style-name="dp4">
          <draw:page-thumbnail draw:style-name="gr19" draw:layer="layout" svg:width="19.798cm" svg:height="11.136cm" svg:x="0.6cm" svg:y="2.257cm" draw:page-number="4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Shape 0" draw:style-name="gr20" draw:text-style-name="P18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1" draw:text-style-name="P19" draw:layer="layout" svg:width="0.40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4" draw:text-style-name="P6" draw:layer="layout" svg:width="25.145cm" svg:height="1.32cm" svg:x="1.575cm" svg:y="0.965cm">
          <text:p text:style-name="P5"><text:span text:style-name="T12">Evolution of the model: normal → variant → defini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5" draw:text-style-name="P6" draw:layer="layout" svg:width="26.923cm" svg:height="0.863cm" svg:x="1.626cm" svg:y="2.388cm">
          <text:p text:style-name="P5"><text:span text:style-name="T13">This is the central design history: each version solves a limitation of the previous 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" draw:style-name="gr24" draw:text-style-name="P20" draw:layer="layout" svg:x1="1.397cm" svg:y1="17.907cm" svg:x2="32.512cm" svg:y2="17.908cm">
          <text:p/>
        </draw:line>
        <draw:custom-shape draw:name="Text 5" draw:style-name="gr76" draw:text-style-name="P6" draw:layer="layout" svg:width="12.191cm" svg:height="0.558cm" svg:x="1.524cm" svg:y="18.085cm">
          <text:p text:style-name="P5"><text:span text:style-name="T9">AI2 Assignment D4-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7" draw:text-style-name="P14" draw:layer="layout" svg:width="1.904cm" svg:height="0.558cm" svg:x="30.48cm" svg:y="18.085cm">
          <text:p text:style-name="P13"><text:span text:style-name="T10">5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8" draw:text-style-name="P9" draw:layer="layout" svg:width="8.254cm" svg:height="1.167cm" svg:x="1.905cm" svg:y="4.013cm">
          <text:p text:style-name="P3"><text:span text:style-name="T30">1 · Normal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9" draw:text-style-name="P8" draw:layer="layout" svg:width="7.492cm" svg:height="1.472cm" svg:x="2.286cm" svg:y="5.994cm">
          <text:p text:style-name="P3"><text:span text:style-name="T22">victim found</text:span></text:p>
          <text:p text:style-name="P3"><text:span text:style-name="T22">→ </text:span><text:span text:style-name="T22">rescue comple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0" draw:text-style-name="P6" draw:layer="layout" svg:width="0.456cm" svg:height="0.507cm" svg:x="2.413cm" svg:y="8.509cm">
          <text:p text:style-name="P5"><text:span text:style-name="T31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1" draw:text-style-name="P6" draw:layer="layout" svg:width="6.984cm" svg:height="0.863cm" svg:x="2.997cm" svg:y="8.509cm">
          <text:p text:style-name="P5"><text:span text:style-name="T32">Matches the assignment co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2" draw:text-style-name="P6" draw:layer="layout" svg:width="0.456cm" svg:height="0.507cm" svg:x="2.413cm" svg:y="9.855cm">
          <text:p text:style-name="P5"><text:span text:style-name="T3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3" draw:text-style-name="P6" draw:layer="layout" svg:width="7.365cm" svg:height="0.863cm" svg:x="2.997cm" svg:y="9.855cm">
          <text:p text:style-name="P5"><text:span text:style-name="T32">Too abstract: rescue happens in pla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84" draw:text-style-name="P6" draw:layer="layout" svg:width="7.111cm" svg:height="1.269cm" svg:x="2.413cm" svg:y="12.116cm">
          <text:p text:style-name="P5"><text:span text:style-name="T34">Role in the project: baseline model for exploration and rescue logi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5" draw:text-style-name="P21" draw:layer="layout" svg:width="8.254cm" svg:height="1.167cm" svg:x="12.827cm" svg:y="4.013cm">
          <text:p text:style-name="P3"><text:span text:style-name="T30">2 · Variant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86" draw:text-style-name="P8" draw:layer="layout" svg:width="7.746cm" svg:height="2.336cm" svg:x="13.081cm" svg:y="5.639cm">
          <text:p text:style-name="P3"><text:span text:style-name="T35">find victim</text:span></text:p>
          <text:p text:style-name="P3"><text:span text:style-name="T35">→ </text:span><text:span text:style-name="T35">load patient</text:span></text:p>
          <text:p text:style-name="P3"><text:span text:style-name="T35">→ </text:span><text:span text:style-name="T35">move with patient</text:span></text:p>
          <text:p text:style-name="P3"><text:span text:style-name="T35">→ </text:span><text:span text:style-name="T35">unload at 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87" draw:text-style-name="P6" draw:layer="layout" svg:width="0.456cm" svg:height="0.507cm" svg:x="13.157cm" svg:y="9.017cm">
          <text:p text:style-name="P5"><text:span text:style-name="T36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88" draw:text-style-name="P6" draw:layer="layout" svg:width="7.365cm" svg:height="0.863cm" svg:x="13.741cm" svg:y="9.017cm">
          <text:p text:style-name="P5"><text:span text:style-name="T32">Rescue becomes transport-orien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89" draw:text-style-name="P6" draw:layer="layout" svg:width="0.456cm" svg:height="0.507cm" svg:x="13.157cm" svg:y="10.363cm">
          <text:p text:style-name="P5"><text:span text:style-name="T37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90" draw:text-style-name="P6" draw:layer="layout" svg:width="7.365cm" svg:height="0.863cm" svg:x="13.741cm" svg:y="10.363cm">
          <text:p text:style-name="P5"><text:span text:style-name="T32">More realistic than instant rescu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91" draw:text-style-name="P6" draw:layer="layout" svg:width="7.238cm" svg:height="1.574cm" svg:x="13.157cm" svg:y="12.116cm">
          <text:p text:style-name="P5"><text:span text:style-name="T34">Remaining issue: the model still needs a principled way to decide when stabilization is necessa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92" draw:text-style-name="P9" draw:layer="layout" svg:width="8.254cm" svg:height="1.167cm" svg:x="23.749cm" svg:y="4.013cm">
          <text:p text:style-name="P3"><text:span text:style-name="T30">3 · Definitive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93" draw:text-style-name="P8" draw:layer="layout" svg:width="7.492cm" svg:height="1.142cm" svg:x="24.054cm" svg:y="5.639cm">
          <text:p text:style-name="P3"><text:span text:style-name="T38">health high</text:span></text:p>
          <text:p text:style-name="P3"><text:span text:style-name="T38">→ </text:span><text:span text:style-name="T38">direct 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94" draw:text-style-name="P8" draw:layer="layout" svg:width="7.492cm" svg:height="1.142cm" svg:x="24.054cm" svg:y="7.315cm">
          <text:p text:style-name="P3"><text:span text:style-name="T38">health low</text:span></text:p>
          <text:p text:style-name="P3"><text:span text:style-name="T38">→ </text:span><text:span text:style-name="T38">stabilize then 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95" draw:text-style-name="P8" draw:layer="layout" svg:width="7.492cm" svg:height="1.142cm" svg:x="24.054cm" svg:y="8.992cm">
          <text:p text:style-name="P3"><text:span text:style-name="T38">too late</text:span></text:p>
          <text:p text:style-name="P3"><text:span text:style-name="T38">→ </text:span><text:span text:style-name="T38">unsolv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96" draw:text-style-name="P6" draw:layer="layout" svg:width="0.456cm" svg:height="0.507cm" svg:x="24.13cm" svg:y="11.354cm">
          <text:p text:style-name="P5"><text:span text:style-name="T39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97" draw:text-style-name="P6" draw:layer="layout" svg:width="6.857cm" svg:height="1.066cm" svg:x="24.714cm" svg:y="11.354cm">
          <text:p text:style-name="P5"><text:span text:style-name="T40">Branch choice comes from victim-health threshol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98" draw:text-style-name="P6" draw:layer="layout" svg:width="6.984cm" svg:height="1.142cm" svg:x="24.13cm" svg:y="13.284cm">
          <text:p text:style-name="P5"><text:span text:style-name="T34">Final message: this version adds a domain-level decision, not just extra ac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8" draw:style-name="gr44" draw:text-style-name="P20" draw:layer="layout" svg:x1="10.363cm" svg:y1="7.162cm" svg:x2="12.369cm" svg:y2="7.163cm">
          <text:p/>
        </draw:line>
        <draw:line draw:name="Shape 29" draw:style-name="gr44" draw:text-style-name="P20" draw:layer="layout" svg:x1="21.31cm" svg:y1="7.162cm" svg:x2="23.317cm" svg:y2="7.163cm">
          <text:p/>
        </draw:line>
        <draw:custom-shape draw:name="Text 30" draw:style-name="gr99" draw:text-style-name="P10" draw:layer="layout" svg:width="26.288cm" svg:height="1.167cm" svg:x="3.759cm" svg:y="15.443cm">
          <text:p text:style-name="P3"><text:span text:style-name="T41">The project moves from symbolic detection, to transport rescue, to autonomous health-based branching. This is principally due to the logical implicatons of the world “Rescue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5" presentation:class="page"/>
          <draw:frame draw:name="Notes Placeholder 2" presentation:style-name="pr6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0.40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0" draw:text-style-name="P6" draw:layer="layout" svg:width="25.145cm" svg:height="1.32cm" svg:x="1.575cm" svg:y="0.965cm">
          <text:p text:style-name="P5"><text:span text:style-name="T12">Validation and demo 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1" draw:text-style-name="P6" draw:layer="layout" svg:width="26.923cm" svg:height="0.863cm" svg:x="1.626cm" svg:y="2.388cm">
          <text:p text:style-name="P5"><text:span text:style-name="T13">The live demo can be replaced by saved planner outputs if the environment fai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" draw:style-name="gr16" draw:text-style-name="P7" draw:layer="layout" svg:x1="1.397cm" svg:y1="17.907cm" svg:x2="32.512cm" svg:y2="17.908cm">
          <text:p/>
        </draw:line>
        <draw:custom-shape draw:name="Text 5" draw:style-name="gr102" draw:text-style-name="P6" draw:layer="layout" svg:width="12.191cm" svg:height="0.558cm" svg:x="1.524cm" svg:y="18.085cm">
          <text:p text:style-name="P5"><text:span text:style-name="T9">AI2 Assignment D4-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3" draw:text-style-name="P14" draw:layer="layout" svg:width="1.904cm" svg:height="0.558cm" svg:x="30.48cm" svg:y="18.085cm">
          <text:p text:style-name="P13"><text:span text:style-name="T10">6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4" draw:text-style-name="P25" draw:layer="layout" svg:width="9.016cm" svg:height="1.218cm" svg:x="2.032cm" svg:y="3.937cm">
          <text:p text:style-name="P5"><text:span text:style-name="T42">Direct 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5" draw:text-style-name="P26" draw:layer="layout" svg:width="1.98cm" svg:height="0.736cm" svg:x="8.001cm" svg:y="4.14cm">
          <text:p text:style-name="P3"><text:span text:style-name="T43">Sol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6" draw:text-style-name="P6" draw:layer="layout" svg:width="7.873cm" svg:height="1.421cm" svg:x="2.286cm" svg:y="6.096cm">
          <text:p text:style-name="P5"><text:span text:style-name="T40">Plan contains transport actions and does not contain start-stabilize-pati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7" draw:text-style-name="P6" draw:layer="layout" svg:width="7.365cm" svg:height="3.428cm" svg:x="2.337cm" svg:y="8.458cm">
          <text:p text:style-name="P5"><text:span text:style-name="T44">Found Plan:</text:span></text:p>
          <text:p text:style-name="P5"><text:span text:style-name="T44">15.0 start-move</text:span></text:p>
          <text:p text:style-name="P5"><text:span text:style-name="T44">21.0 start-inspect</text:span></text:p>
          <text:p text:style-name="P5"><text:span text:style-name="T44">22.0 start-assess</text:span></text:p>
          <text:p text:style-name="P5"><text:span text:style-name="T44">23.0 start-load</text:span></text:p>
          <text:p text:style-name="P5"><text:span text:style-name="T44">33.0 start-un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8" draw:text-style-name="P27" draw:layer="layout" svg:width="9.016cm" svg:height="1.218cm" svg:x="12.446cm" svg:y="3.937cm">
          <text:p text:style-name="P5"><text:span text:style-name="T45">Stabilize + 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9" draw:text-style-name="P26" draw:layer="layout" svg:width="1.98cm" svg:height="0.736cm" svg:x="18.847cm" svg:y="4.14cm">
          <text:p text:style-name="P3"><text:span text:style-name="T43">Sol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0" draw:text-style-name="P6" draw:layer="layout" svg:width="7.746cm" svg:height="1.421cm" svg:x="12.7cm" svg:y="6.096cm">
          <text:p text:style-name="P5"><text:span text:style-name="T40">Plan contains start-stabilize-patient before loading and moving the pati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11" draw:text-style-name="P6" draw:layer="layout" svg:width="7.365cm" svg:height="2.945cm" svg:x="12.751cm" svg:y="8.458cm">
          <text:p text:style-name="P5"><text:span text:style-name="T44">Found Plan:</text:span></text:p>
          <text:p text:style-name="P5"><text:span text:style-name="T44">10.0 start-assess</text:span></text:p>
          <text:p text:style-name="P5"><text:span text:style-name="T44">11.0 start-stabilize</text:span></text:p>
          <text:p text:style-name="P5"><text:span text:style-name="T44">15.0 start-load</text:span></text:p>
          <text:p text:style-name="P5"><text:span text:style-name="T44">29.0 start-un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2" draw:text-style-name="P28" draw:layer="layout" svg:width="9.016cm" svg:height="1.218cm" svg:x="22.86cm" svg:y="3.937cm">
          <text:p text:style-name="P5"><text:span text:style-name="T42">Too-lat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3" draw:text-style-name="P23" draw:layer="layout" svg:width="2.412cm" svg:height="0.736cm" svg:x="28.067cm" svg:y="4.14cm">
          <text:p text:style-name="P3"><text:span text:style-name="T43">Unsolv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4" draw:text-style-name="P6" draw:layer="layout" svg:width="7.619cm" svg:height="1.421cm" svg:x="23.114cm" svg:y="6.096cm">
          <text:p text:style-name="P5"><text:span text:style-name="T40">Forced delay makes the mission fail before rescue can be achie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15" draw:text-style-name="P6" draw:layer="layout" svg:width="7.365cm" svg:height="2.158cm" svg:x="23.165cm" svg:y="8.458cm">
          <text:p text:style-name="P5"><text:span text:style-name="T44">Problem unsolvable</text:span></text:p>
          <text:p text:style-name="P5"><text:span text:style-name="T44">Metric: -1</text:span></text:p>
          <text:p text:style-name="P5"><text:span text:style-name="T44">Dead-Ends det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16" draw:text-style-name="P10" draw:layer="layout" svg:width="27.939cm" svg:height="1.218cm" svg:x="2.794cm" svg:y="14.935cm">
          <text:p text:style-name="P3"><text:span text:style-name="T46">Demo path: open final domain + one problem in VS Code, run ENHSP local Docker, then compare with the saved plan fi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6" presentation:class="page"/>
          <draw:frame draw:name="Notes Placeholder 2" presentation:style-name="pr7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1" draw:text-style-name="P1" draw:layer="layout" svg:width="33.865cm" svg:height="19.049cm" svg:x="0.4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0.40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7" draw:text-style-name="P6" draw:layer="layout" svg:width="25.145cm" svg:height="1.32cm" svg:x="1.575cm" svg:y="0.965cm">
          <text:p text:style-name="P5"><text:span text:style-name="T12">Reflection, limitations, and final deli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8" draw:text-style-name="P6" draw:layer="layout" svg:width="26.923cm" svg:height="0.863cm" svg:x="1.626cm" svg:y="2.388cm">
          <text:p text:style-name="P5"><text:span text:style-name="T13">The model is deliberately symbolic: it makes planning tractable by making its abstractions explic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" draw:style-name="gr16" draw:text-style-name="P7" draw:layer="layout" svg:x1="1.397cm" svg:y1="17.907cm" svg:x2="32.512cm" svg:y2="17.908cm">
          <text:p/>
        </draw:line>
        <draw:custom-shape draw:name="Text 5" draw:style-name="gr119" draw:text-style-name="P6" draw:layer="layout" svg:width="12.191cm" svg:height="0.558cm" svg:x="1.524cm" svg:y="18.085cm">
          <text:p text:style-name="P5"><text:span text:style-name="T9">AI2 Assignment D4-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0" draw:text-style-name="P14" draw:layer="layout" svg:width="1.904cm" svg:height="0.558cm" svg:x="30.48cm" svg:y="18.085cm">
          <text:p text:style-name="P13"><text:span text:style-name="T10">7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1" draw:text-style-name="P9" draw:layer="layout" svg:width="9.016cm" svg:height="1.218cm" svg:x="2.286cm" svg:y="3.861cm">
          <text:p text:style-name="P3"><text:span text:style-name="T30">What 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2" draw:text-style-name="P6" draw:layer="layout" svg:width="0.456cm" svg:height="0.507cm" svg:x="2.667cm" svg:y="5.791cm">
          <text:p text:style-name="P5"><text:span text:style-name="T47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23" draw:text-style-name="P6" draw:layer="layout" svg:width="7.873cm" svg:height="0.863cm" svg:x="3.251cm" svg:y="5.791cm">
          <text:p text:style-name="P5"><text:span text:style-name="T48">Q1 enforces inspect → detect → rescu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24" draw:text-style-name="P6" draw:layer="layout" svg:width="0.456cm" svg:height="0.507cm" svg:x="2.667cm" svg:y="7.163cm">
          <text:p text:style-name="P5"><text:span text:style-name="T47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25" draw:text-style-name="P6" draw:layer="layout" svg:width="7.873cm" svg:height="0.863cm" svg:x="3.251cm" svg:y="7.163cm">
          <text:p text:style-name="P5"><text:span text:style-name="T48">Q2 shows health/time intera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6" draw:text-style-name="P6" draw:layer="layout" svg:width="0.456cm" svg:height="0.507cm" svg:x="2.667cm" svg:y="8.534cm">
          <text:p text:style-name="P5"><text:span text:style-name="T47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27" draw:text-style-name="P6" draw:layer="layout" svg:width="7.746cm" svg:height="1.142cm" svg:x="3.251cm" svg:y="8.534cm">
          <text:p text:style-name="P5"><text:span text:style-name="T48">Definitive validates direct, stabilization, and failure ca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28" draw:text-style-name="P22" draw:layer="layout" svg:width="9.016cm" svg:height="1.218cm" svg:x="12.446cm" svg:y="3.861cm">
          <text:p text:style-name="P3"><text:span text:style-name="T30">Known lim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29" draw:text-style-name="P6" draw:layer="layout" svg:width="0.456cm" svg:height="0.507cm" svg:x="12.827cm" svg:y="5.791cm">
          <text:p text:style-name="P5"><text:span text:style-name="T49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30" draw:text-style-name="P6" draw:layer="layout" svg:width="7.873cm" svg:height="0.863cm" svg:x="13.411cm" svg:y="5.791cm">
          <text:p text:style-name="P5"><text:span text:style-name="T48">No real partial observability or belief st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1" draw:text-style-name="P6" draw:layer="layout" svg:width="0.456cm" svg:height="0.507cm" svg:x="12.827cm" svg:y="7.163cm">
          <text:p text:style-name="P5"><text:span text:style-name="T49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32" draw:text-style-name="P6" draw:layer="layout" svg:width="7.873cm" svg:height="1.142cm" svg:x="13.411cm" svg:y="7.163cm">
          <text:p text:style-name="P5"><text:span text:style-name="T48">No noisy sensing, geometry, motion planning, or execution err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3" draw:text-style-name="P6" draw:layer="layout" svg:width="0.456cm" svg:height="0.507cm" svg:x="12.827cm" svg:y="9.042cm">
          <text:p text:style-name="P5"><text:span text:style-name="T49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34" draw:text-style-name="P6" draw:layer="layout" svg:width="7.873cm" svg:height="1.142cm" svg:x="13.411cm" svg:y="9.042cm">
          <text:p text:style-name="P5"><text:span text:style-name="T48">Some delayed PDDL+ outputs are documented as planner limita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35" draw:text-style-name="P29" draw:layer="layout" svg:width="9.016cm" svg:height="1.218cm" svg:x="22.606cm" svg:y="3.861cm">
          <text:p text:style-name="P3"><text:span text:style-name="T30">Repository deli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36" draw:text-style-name="P6" draw:layer="layout" svg:width="7.873cm" svg:height="4.622cm" svg:x="22.987cm" svg:y="5.715cm">
          <text:p text:style-name="P5"><text:span text:style-name="T50">Code folder:</text:span></text:p>
          <text:p text:style-name="P5"><text:span text:style-name="T50">Codes/...</text:span></text:p>
          <text:p text:style-name="P5"><text:span text:style-name="T51"/></text:p>
          <text:p text:style-name="P5"><text:span text:style-name="T50">Report:</text:span></text:p>
          <text:p text:style-name="P5"><text:span text:style-name="T50">Report/report.pdf</text:span></text:p>
          <text:p text:style-name="P5"><text:span text:style-name="T51"/></text:p>
          <text:p text:style-name="P5"><text:span text:style-name="T50">Slides:</text:span></text:p>
          <text:p text:style-name="P5"><text:span text:style-name="T50">slide/presentation.p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37" draw:text-style-name="P31" draw:layer="layout" svg:width="28.066cm" svg:height="1.828cm" svg:x="2.921cm" svg:y="14.173cm">
          <text:p text:style-name="P30"><text:span text:style-name="T52">The assignment demonstrates how a planning model can encode information acquisition, time pressure, and health-based branch choice while clearly exposing its abstrac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7" presentation:class="page"/>
          <draw:frame draw:name="Notes Placeholder 2" presentation:style-name="pr8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Aptos Display" svg:font-family="'Aptos Display'" style:font-family-generic="swiss" style:font-pitch="variable"/>
    <style:font-face style:name="Aptos Display1" svg:font-family="'Aptos Display'" style:font-family-generic="modern" style:font-pitch="fixed"/>
    <style:font-face style:name="Aptos1" svg:font-family="Aptos" style:font-family-generic="swiss" style:font-pitch="variable"/>
    <style:font-face style:name="Aptos2" svg:font-family="Aptos" style:font-family-generic="modern" style:font-pitch="fixed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8cm" svg:height="3.18cm" svg:x="1.693cm" svg:y="0.76cm" presentation:class="title" presentation:placeholder="true">
        <draw:text-box/>
      </draw:frame>
      <draw:frame presentation:style-name="DEFAULT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3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3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3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4-V2 Search and Rescue — Unknown Victim Location</dc:title>
    <dc:subject>AI2 Assignment D4-V2 Search and Rescue</dc:subject>
    <meta:initial-creator>OpenAI</meta:initial-creator>
    <meta:editing-cycles>3</meta:editing-cycles>
    <meta:creation-date>2026-06-19T00:45:19</meta:creation-date>
    <dc:date>2026-06-19T08:01:58.933019274</dc:date>
    <meta:editing-duration>PT33M42S</meta:editing-duration>
    <meta:generator>LibreOffice/24.2.7.2$Linux_X86_64 LibreOffice_project/420$Build-2</meta:generator>
    <meta:document-statistic meta:object-count="210"/>
    <meta:user-defined meta:name="AppVersion">16.0000</meta:user-defined>
    <meta:user-defined meta:name="Company">AI2 Assignment</meta:user-defined>
    <meta:user-defined meta:name="Notes" meta:value-type="float">7</meta:user-defined>
    <meta:user-defined meta:name="PresentationFormat">On-screen Show (16:9)</meta:user-defined>
    <meta:user-defined meta:name="Slides" meta:value-type="float">7</meta:user-defined>
  </office:meta>
</office:document-meta>
</file>